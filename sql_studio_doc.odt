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Col_25cm" style:family="table-column" style:display-name="Col_25cm">
      <style:table-column-properties style:column-width="2.5cm"/>
    </style:style>
    <style:style style:name="Col_5cm" style:family="table-column" style:display-name="Col_5cm">
      <style:table-column-properties style:column-width="5cm"/>
    </style:style>
    <style:style style:name="Col_85cm" style:family="table-column" style:display-name="Col_85cm">
      <style:table-column-properties style:column-width="8.5cm"/>
    </style:style>
    <style:style style:name="Col_3cm" style:family="table-column" style:display-name="Col_3cm">
      <style:table-column-properties style:column-width="3cm"/>
    </style:style>
    <style:style style:name="Col_13cm" style:family="table-column" style:display-name="Col_13cm">
      <style:table-column-properties style:column-width="13cm"/>
    </style:style>
    <style:style style:name="Col_10cm" style:family="table-column" style:display-name="Col_10cm">
      <style:table-column-properties style:column-width="10cm"/>
    </style:style>
    <style:style style:name="Col_35cm" style:family="table-column" style:display-name="Col_35cm">
      <style:table-column-properties style:column-width="3.5cm"/>
    </style:style>
    <style:style style:name="Col2_4cm" style:family="table-column" style:display-name="Col2_4cm">
      <style:table-column-properties style:column-width="4cm"/>
    </style:style>
    <style:style style:name="Col2_12cm" style:family="table-column" style:display-name="Col2_12cm">
      <style:table-column-properties style:column-width="12cm"/>
    </style:style>
  </office:automatic-styles>
  <office:body>
    <office:text>
      <text:p text:style-name="Title">SQL STUDIO</text:p>
      <text:p text:style-name="Subtitle">Interpreteur SQL complet  ·  Un fichier HTML  ·  Zero dependance</text:p>
      <text:p text:style-name="HR"/>
      <text:h text:outline-level="1" text:style-name="Heading1">1. Presentation</text:h>
      <text:p text:style-name="Body">SQL Studio est un outil pedagogique pour apprendre et pratiquer SQL. Il tourne entierement dans le navigateur — pas de serveur, pas d'installation, pas de connexion reseau. Un seul fichier HTML a ouvrir dans Firefox ou Chrome.</text:p>
      <text:p text:style-name="Body">La base de donnees embarquee est une mini base de support pedagogique librement copiee depuis l'image d'un quiz DGSE : trois tables (base, officer, missions), des jointures naturelles et des NULLs intentionnels.</text:p>
      <text:p text:style-name="HR"/>
      <text:h text:outline-level="1" text:style-name="Heading1">2. Le moteur SQL</text:h>
      <text:p text:style-name="Body">Un interpreteur SQL ecrit en JavaScript pur, environ 400 lignes, sans aucune librairie externe. Il parse la requete, construit le jeu de lignes en memoire, applique les filtres et projections, et retourne le resultat.</text:p>
      <text:h text:outline-level="2" text:style-name="Heading2">2.1  SELECT</text:h>
      <text:p text:style-name="Code">SELECT * FROM table<text:line-break/>SELECT col1, col2 FROM table<text:line-break/>SELECT col1 AS alias FROM table<text:line-break/>SELECT DISTINCT col FROM table</text:p>
      <text:p text:style-name="Bullet">• SELECT * retourne toutes les colonnes</text:p>
      <text:p text:style-name="Bullet">• SELECT col1, col2 retourne uniquement les colonnes nommees</text:p>
      <text:p text:style-name="Bullet">• AS renomme une colonne dans le resultat</text:p>
      <text:p text:style-name="Bullet">• DISTINCT supprime les doublons dans le resultat</text:p>
      <text:h text:outline-level="2" text:style-name="Heading2">2.2  FROM et alias de table</text:h>
      <text:p text:style-name="Code">SELECT * FROM missions<text:line-break/>SELECT m.name FROM missions m<text:line-break/>SELECT m.name FROM missions AS m</text:p>
      <text:p text:style-name="Body">L'alias (ici m) abrege les references aux colonnes dans les JOINs et conditions. Indispensable quand deux tables ont des colonnes de meme nom.</text:p>
      <text:h text:outline-level="2" text:style-name="Heading2">2.3  WHERE — filtrage</text:h>
      <text:p text:style-name="Code">SELECT * FROM missions WHERE priority &gt; 3<text:line-break/>SELECT * FROM officer  WHERE rank = 'Amiral'<text:line-break/>SELECT * FROM missions WHERE status != 'failed'</text:p>
      <text:p text:style-name="Body">Attention : en SQL l'egalite s'ecrit = et non == (qui est du JavaScript). SQL Studio detecte le == et affiche un avertissement.</text:p>
      <text:p text:style-name="Blank"/>
      <table:table table:style-name="TabMain">
        <table:table-column table:style-name="Col_25cm"/>
        <table:table-column table:style-name="Col_5cm"/>
        <table:table-column table:style-name="Col_85cm"/>
        <table:table-row>
          <table:table-cell table:style-name="CHead">
            <text:p text:style-name="CHeadT">Operateur</text:p>
          </table:table-cell>
          <table:table-cell table:style-name="CHead">
            <text:p text:style-name="CHeadT">Signification</text:p>
          </table:table-cell>
          <table:table-cell table:style-name="CHead">
            <text:p text:style-name="CHeadT">Exemple</text:p>
          </table:table-cell>
        </table:table-row>
        <table:table-row>
          <table:table-cell table:style-name="CData">
            <text:p text:style-name="CDataT">=</text:p>
          </table:table-cell>
          <table:table-cell table:style-name="CData">
            <text:p text:style-name="CDataT">Egal</text:p>
          </table:table-cell>
          <table:table-cell table:style-name="CData">
            <text:p text:style-name="CDataT">status = 'ongoing'</text:p>
          </table:table-cell>
        </table:table-row>
        <table:table-row>
          <table:table-cell table:style-name="CData2">
            <text:p text:style-name="CData2T">!=</text:p>
          </table:table-cell>
          <table:table-cell table:style-name="CData2">
            <text:p text:style-name="CData2T">Different</text:p>
          </table:table-cell>
          <table:table-cell table:style-name="CData2">
            <text:p text:style-name="CData2T">rank != 'Amiral'</text:p>
          </table:table-cell>
        </table:table-row>
        <table:table-row>
          <table:table-cell table:style-name="CData">
            <text:p text:style-name="CDataT">&lt;&gt;</text:p>
          </table:table-cell>
          <table:table-cell table:style-name="CData">
            <text:p text:style-name="CDataT">Different (SQL)</text:p>
          </table:table-cell>
          <table:table-cell table:style-name="CData">
            <text:p text:style-name="CDataT">rank &lt;&gt; 'Amiral'</text:p>
          </table:table-cell>
        </table:table-row>
        <table:table-row>
          <table:table-cell table:style-name="CData2">
            <text:p text:style-name="CData2T">&gt;</text:p>
          </table:table-cell>
          <table:table-cell table:style-name="CData2">
            <text:p text:style-name="CData2T">Superieur</text:p>
          </table:table-cell>
          <table:table-cell table:style-name="CData2">
            <text:p text:style-name="CData2T">priority &gt; 3</text:p>
          </table:table-cell>
        </table:table-row>
        <table:table-row>
          <table:table-cell table:style-name="CData">
            <text:p text:style-name="CDataT">&lt;</text:p>
          </table:table-cell>
          <table:table-cell table:style-name="CData">
            <text:p text:style-name="CDataT">Inferieur</text:p>
          </table:table-cell>
          <table:table-cell table:style-name="CData">
            <text:p text:style-name="CDataT">priority &lt; 5</text:p>
          </table:table-cell>
        </table:table-row>
        <table:table-row>
          <table:table-cell table:style-name="CData2">
            <text:p text:style-name="CData2T">&gt;=</text:p>
          </table:table-cell>
          <table:table-cell table:style-name="CData2">
            <text:p text:style-name="CData2T">Superieur ou egal</text:p>
          </table:table-cell>
          <table:table-cell table:style-name="CData2">
            <text:p text:style-name="CData2T">priority &gt;= 4</text:p>
          </table:table-cell>
        </table:table-row>
        <table:table-row>
          <table:table-cell table:style-name="CData">
            <text:p text:style-name="CDataT">&lt;=</text:p>
          </table:table-cell>
          <table:table-cell table:style-name="CData">
            <text:p text:style-name="CDataT">Inferieur ou egal</text:p>
          </table:table-cell>
          <table:table-cell table:style-name="CData">
            <text:p text:style-name="CDataT">priority &lt;= 2</text:p>
          </table:table-cell>
        </table:table-row>
      </table:table>
      <text:p text:style-name="Blank"/>
      <text:h text:outline-level="2" text:style-name="Heading2">2.4  AND / OR — conditions multiples</text:h>
      <text:p text:style-name="Code">-- AND : les deux conditions doivent etre vraies<text:line-break/>SELECT * FROM missions WHERE priority &gt;= 4 AND status = 'ongoing'<text:line-break/><text:line-break/>-- OR : au moins une condition doit etre vraie<text:line-break/>SELECT * FROM missions WHERE base_id IS NULL OR status = 'failed'<text:line-break/><text:line-break/>-- Parentheses pour controler la priorite<text:line-break/>SELECT * FROM missions<text:line-break/>WHERE (priority &gt;= 4 OR status = 'ongoing') AND base_id IS NOT NULL</text:p>
      <text:h text:outline-level="2" text:style-name="Heading2">2.5  IN et NOT IN</text:h>
      <text:p text:style-name="Code">SELECT * FROM missions WHERE id IN (1, 3, 5)<text:line-break/>SELECT * FROM officer  WHERE rank IN ('Amiral', 'General')<text:line-break/>SELECT * FROM missions WHERE status NOT IN ('failed', 'pending')</text:p>
      <text:h text:outline-level="2" text:style-name="Heading2">2.6  IS NULL et IS NOT NULL</text:h>
      <text:p text:style-name="Body">NULL signifie valeur absente. On ne peut pas tester un NULL avec = ou != — il faut IS NULL ou IS NOT NULL.</text:p>
      <text:p text:style-name="Code">SELECT * FROM missions WHERE base_id IS NULL<text:line-break/>SELECT * FROM missions WHERE secret_id IS NOT NULL</text:p>
      <text:h text:outline-level="2" text:style-name="Heading2">2.7  ORDER BY</text:h>
      <text:p text:style-name="Code">SELECT * FROM missions ORDER BY priority ASC<text:line-break/>SELECT * FROM missions ORDER BY priority DESC<text:line-break/>SELECT * FROM missions ORDER BY status ASC, priority DESC</text:p>
      <text:p text:style-name="Body">ASC est le comportement par defaut. Les valeurs NULL sont placees en fin de tri.</text:p>
      <text:h text:outline-level="2" text:style-name="Heading2">2.8  LIMIT</text:h>
      <text:p text:style-name="Code">SELECT * FROM missions ORDER BY priority DESC LIMIT 3</text:p>
      <text:p text:style-name="Body">LIMIT est applique apres ORDER BY — il permet de recuperer le top N d'un classement.</text:p>
      <text:h text:outline-level="2" text:style-name="Heading2">2.9  INNER JOIN</text:h>
      <text:p text:style-name="Body">Combine les lignes de deux tables quand la condition ON est vraie. Les lignes sans correspondance des deux cotes sont exclues.</text:p>
      <text:p text:style-name="Code">-- 4 lignes retournees (mission 5 exclue car base_id=NULL)<text:line-break/>SELECT m.name, b.name<text:line-break/>FROM missions m<text:line-break/>INNER JOIN base b ON m.base_id = b.id<text:line-break/><text:line-break/>SELECT m.name, o.name<text:line-break/>FROM missions m<text:line-break/>INNER JOIN officer o ON m.officer_id = o.id</text:p>
      <text:h text:outline-level="2" text:style-name="Heading2">2.10  LEFT JOIN</text:h>
      <text:p text:style-name="Body">Conserve TOUTES les lignes de la table de gauche (FROM). Si aucune correspondance a droite, les colonnes droites valent NULL.</text:p>
      <text:p text:style-name="Code">-- 5 lignes : mission 5 conservee avec b.name = NULL<text:line-break/>SELECT m.name, b.name<text:line-break/>FROM missions m<text:line-break/>LEFT JOIN base b ON m.base_id = b.id<text:line-break/><text:line-break/>-- Trouver les missions sans base<text:line-break/>SELECT m.name<text:line-break/>FROM missions m<text:line-break/>LEFT JOIN base b ON m.base_id = b.id<text:line-break/>WHERE b.id IS NULL</text:p>
      <text:p text:style-name="Body">Regle : LEFT JOIN quand on veut tous les enregistrements quelles que soient les correspondances. INNER JOIN quand on veut seulement les enregistrements qui ont une correspondance.</text:p>
      <text:h text:outline-level="2" text:style-name="Heading2">2.11  Jointures multiples (3 tables ou plus)</text:h>
      <text:p text:style-name="Code">SELECT m.name AS mission, b.name AS base, o.name AS officier<text:line-break/>FROM missions m<text:line-break/>LEFT JOIN base b    ON m.base_id    = b.id<text:line-break/>LEFT JOIN officer o ON m.officer_id = o.id<text:line-break/><text:line-break/>-- Avec filtre sur le resultat joint<text:line-break/>SELECT m.name, b.name, o.rank<text:line-break/>FROM missions m<text:line-break/>LEFT JOIN base b    ON m.base_id    = b.id<text:line-break/>LEFT JOIN officer o ON m.officer_id = o.id<text:line-break/>WHERE m.status = 'ongoing'</text:p>
      <text:p text:style-name="Body">On part de la table principale (FROM), puis on greffe les tables secondaires une par une. L'ordre des LEFT JOIN est important : chaque JOIN s'appuie sur le resultat du precedent.</text:p>
      <text:h text:outline-level="2" text:style-name="Heading2">2.12  CASE WHEN</text:h>
      <text:p text:style-name="Body">Cree une colonne calculee dont la valeur depend de conditions — equivalent SQL du if/else.</text:p>
      <text:p text:style-name="Code">-- Etiquette simple<text:line-break/>SELECT name,<text:line-break/>  CASE WHEN priority &gt;= 4 THEN 'HAUTE' ELSE 'NORMALE' END AS urgence<text:line-break/>FROM missions<text:line-break/><text:line-break/>-- Scoring : additionner plusieurs CASE WHEN<text:line-break/>SELECT m.name, m.secret_id,<text:line-break/>  (CASE WHEN m.priority &gt;= 4       THEN 1 ELSE 0 END<text:line-break/>  +CASE WHEN b.level_security &gt; 7  THEN 1 ELSE 0 END<text:line-break/>  +CASE WHEN m.status = 'ongoing'  THEN 1 ELSE 0 END<text:line-break/>  +CASE WHEN o.rank = 'Director'   THEN 1 ELSE 0 END) AS score<text:line-break/>FROM missions m<text:line-break/>LEFT JOIN base b    ON m.base_id    = b.id<text:line-break/>LEFT JOIN officer o ON m.officer_id = o.id<text:line-break/>ORDER BY score DESC</text:p>
      <text:p text:style-name="Body">La version scoring retourne toutes les missions avec un score de 0 a 4. La plus pertinente apparait en premier. La mission sans base obtient un score partiel au lieu d'etre exclue — c'est l'avantage du LEFT JOIN vs INNER JOIN.</text:p>
      <text:p text:style-name="HR"/>
      <text:h text:outline-level="1" text:style-name="Heading1">3. DDL et DML — modifier la base</text:h>
      <text:h text:outline-level="2" text:style-name="Heading2">3.1  CREATE TABLE</text:h>
      <text:p text:style-name="Code">CREATE TABLE agent (id INTEGER, codename TEXT, clearance INTEGER)<text:line-break/>-- Types : INTEGER, TEXT, REAL</text:p>
      <text:h text:outline-level="2" text:style-name="Heading2">3.2  DROP TABLE</text:h>
      <text:p text:style-name="Code">DROP TABLE agent</text:p>
      <text:p text:style-name="Body">Supprime la table et toutes ses donnees. Irreversible.</text:p>
      <text:h text:outline-level="2" text:style-name="Heading2">3.3  INSERT INTO</text:h>
      <text:p text:style-name="Code">INSERT INTO officer (id, name, rank, access_code)<text:line-break/>VALUES (6, 'Vanta', 'Colonel', 'VAN-001')<text:line-break/><text:line-break/>-- NULL explicite<text:line-break/>INSERT INTO missions (id, name, base_id, officer_id, priority, status, secret_id)<text:line-break/>VALUES (6, 'blackout', NULL, 3, 5, 'ongoing', NULL)</text:p>
      <text:h text:outline-level="2" text:style-name="Heading2">3.4  UPDATE</text:h>
      <text:p text:style-name="Code">UPDATE missions SET status = 'completed' WHERE id = 1<text:line-break/>UPDATE officer SET rank = 'General', access_code = 'HOX-999' WHERE id = 2<text:line-break/><text:line-break/>-- ATTENTION : sans WHERE, toutes les lignes sont modifiees<text:line-break/>UPDATE missions SET priority = 3</text:p>
      <text:h text:outline-level="2" text:style-name="Heading2">3.5  DELETE FROM</text:h>
      <text:p text:style-name="Code">DELETE FROM officer WHERE id = 6<text:line-break/>DELETE FROM missions WHERE status = 'failed'<text:line-break/><text:line-break/>-- ATTENTION : sans WHERE, toutes les lignes sont supprimees<text:line-break/>DELETE FROM missions</text:p>
      <text:p text:style-name="HR"/>
      <text:h text:outline-level="1" text:style-name="Heading1">4. Interface</text:h>
      <text:h text:outline-level="2" text:style-name="Heading2">4.1  Panneau gauche — Explorateur de tables</text:h>
      <text:p text:style-name="Bullet">• Nombre de lignes affiche a droite du nom de chaque table</text:p>
      <text:p text:style-name="Bullet">• Clic sur le nom : deplie le schema (colonnes + types) et l'apercu des 5 premieres lignes</text:p>
      <text:p text:style-name="Bullet">• Bouton SELECT * : injecte et execute SELECT * FROM &lt;table&gt; immediatement</text:p>
      <text:p text:style-name="Bullet">• Bouton DROP : supprime la table apres confirmation</text:p>
      <text:h text:outline-level="2" text:style-name="Heading2">4.2  Mots-cles cliquables</text:h>
      <text:p text:style-name="Body">La palette regroupe les mots-cles en 5 familles. Un clic insere le mot-cle (et un snippet si pertinent) en fin d'editeur.</text:p>
      <text:p text:style-name="Blank"/>
      <table:table table:style-name="TabMain">
        <table:table-column table:style-name="Col_3cm"/>
        <table:table-column table:style-name="Col_13cm"/>
        <table:table-row>
          <table:table-cell table:style-name="CHead">
            <text:p text:style-name="CHeadT">Famille</text:p>
          </table:table-cell>
          <table:table-cell table:style-name="CHead">
            <text:p text:style-name="CHeadT">Mots-cles</text:p>
          </table:table-cell>
        </table:table-row>
        <table:table-row>
          <table:table-cell table:style-name="CData">
            <text:p text:style-name="CDataT">Lecture</text:p>
          </table:table-cell>
          <table:table-cell table:style-name="CData">
            <text:p text:style-name="CDataT">SELECT  DISTINCT  FROM  WHERE  ORDER BY  ASC  DESC  LIMIT</text:p>
          </table:table-cell>
        </table:table-row>
        <table:table-row>
          <table:table-cell table:style-name="CData2">
            <text:p text:style-name="CData2T">Jointures</text:p>
          </table:table-cell>
          <table:table-cell table:style-name="CData2">
            <text:p text:style-name="CData2T">INNER JOIN  LEFT JOIN  ON</text:p>
          </table:table-cell>
        </table:table-row>
        <table:table-row>
          <table:table-cell table:style-name="CData">
            <text:p text:style-name="CDataT">Conditions</text:p>
          </table:table-cell>
          <table:table-cell table:style-name="CData">
            <text:p text:style-name="CDataT">AND  OR  NOT  IN (...)  IS NULL  IS NOT NULL  BETWEEN</text:p>
          </table:table-cell>
        </table:table-row>
        <table:table-row>
          <table:table-cell table:style-name="CData2">
            <text:p text:style-name="CData2T">Ecriture</text:p>
          </table:table-cell>
          <table:table-cell table:style-name="CData2">
            <text:p text:style-name="CData2T">INSERT INTO  UPDATE SET  DELETE FROM</text:p>
          </table:table-cell>
        </table:table-row>
        <table:table-row>
          <table:table-cell table:style-name="CData">
            <text:p text:style-name="CDataT">Structure</text:p>
          </table:table-cell>
          <table:table-cell table:style-name="CData">
            <text:p text:style-name="CDataT">CREATE TABLE  DROP TABLE</text:p>
          </table:table-cell>
        </table:table-row>
      </table:table>
      <text:p text:style-name="Blank"/>
      <text:h text:outline-level="2" text:style-name="Heading2">4.3  Editeur SQL</text:h>
      <text:p text:style-name="Bullet">• Saisie libre de la requete</text:p>
      <text:p text:style-name="Bullet">• Ctrl+Enter pour executer</text:p>
      <text:p text:style-name="Bullet">• Bouton remise a zero efface l'editeur</text:p>
      <text:h text:outline-level="2" text:style-name="Heading2">4.4  Zone de resultats</text:h>
      <text:p text:style-name="Bullet">• Tableau du resultat avec nombre de lignes retournees</text:p>
      <text:p text:style-name="Bullet">• Bouton export CSV disponible apres un SELECT produisant des resultats</text:p>
      <text:p text:style-name="Bullet">• Avertissement si '==' detecte dans la requete (erreur JavaScript)</text:p>
      <text:p text:style-name="Bullet">• En mode Training : verdict CORRECT / INCORRECT + requete de reference</text:p>
      <text:p text:style-name="HR"/>
      <text:h text:outline-level="1" text:style-name="Heading1">5. Mode Training</text:h>
      <text:p text:style-name="Body">Active via le bouton Training dans le header. Charge automatiquement la base DGSE si aucune table n'est presente.</text:p>
      <text:h text:outline-level="2" text:style-name="Heading2">5.1  Structure des exercices</text:h>
      <text:p text:style-name="Blank"/>
      <table:table table:style-name="TabMain">
        <table:table-column table:style-name="Col_25cm"/>
        <table:table-column table:style-name="Col_10cm"/>
        <table:table-column table:style-name="Col_35cm"/>
        <table:table-row>
          <table:table-cell table:style-name="CHead">
            <text:p text:style-name="CHeadT">Niveau</text:p>
          </table:table-cell>
          <table:table-cell table:style-name="CHead">
            <text:p text:style-name="CHeadT">Theme</text:p>
          </table:table-cell>
          <table:table-cell table:style-name="CHead">
            <text:p text:style-name="CHeadT">Questions</text:p>
          </table:table-cell>
        </table:table-row>
        <table:table-row>
          <table:table-cell table:style-name="CData">
            <text:p text:style-name="CDataT">1</text:p>
          </table:table-cell>
          <table:table-cell table:style-name="CData">
            <text:p text:style-name="CDataT">SELECT</text:p>
          </table:table-cell>
          <table:table-cell table:style-name="CData">
            <text:p text:style-name="CDataT">1</text:p>
          </table:table-cell>
        </table:table-row>
        <table:table-row>
          <table:table-cell table:style-name="CData2">
            <text:p text:style-name="CData2T">2</text:p>
          </table:table-cell>
          <table:table-cell table:style-name="CData2">
            <text:p text:style-name="CData2T">WHERE</text:p>
          </table:table-cell>
          <table:table-cell table:style-name="CData2">
            <text:p text:style-name="CData2T">1</text:p>
          </table:table-cell>
        </table:table-row>
        <table:table-row>
          <table:table-cell table:style-name="CData">
            <text:p text:style-name="CDataT">3</text:p>
          </table:table-cell>
          <table:table-cell table:style-name="CData">
            <text:p text:style-name="CDataT">AND / OR / IS NULL</text:p>
          </table:table-cell>
          <table:table-cell table:style-name="CData">
            <text:p text:style-name="CDataT">1</text:p>
          </table:table-cell>
        </table:table-row>
        <table:table-row>
          <table:table-cell table:style-name="CData2">
            <text:p text:style-name="CData2T">4</text:p>
          </table:table-cell>
          <table:table-cell table:style-name="CData2">
            <text:p text:style-name="CData2T">DISTINCT  ·  ORDER BY</text:p>
          </table:table-cell>
          <table:table-cell table:style-name="CData2">
            <text:p text:style-name="CData2T">2</text:p>
          </table:table-cell>
        </table:table-row>
        <table:table-row>
          <table:table-cell table:style-name="CData">
            <text:p text:style-name="CDataT">5</text:p>
          </table:table-cell>
          <table:table-cell table:style-name="CData">
            <text:p text:style-name="CDataT">INNER JOIN</text:p>
          </table:table-cell>
          <table:table-cell table:style-name="CData">
            <text:p text:style-name="CDataT">2</text:p>
          </table:table-cell>
        </table:table-row>
        <table:table-row>
          <table:table-cell table:style-name="CData2">
            <text:p text:style-name="CData2T">6</text:p>
          </table:table-cell>
          <table:table-cell table:style-name="CData2">
            <text:p text:style-name="CData2T">LEFT JOIN</text:p>
          </table:table-cell>
          <table:table-cell table:style-name="CData2">
            <text:p text:style-name="CData2T">2</text:p>
          </table:table-cell>
        </table:table-row>
        <table:table-row>
          <table:table-cell table:style-name="CData">
            <text:p text:style-name="CDataT">7</text:p>
          </table:table-cell>
          <table:table-cell table:style-name="CData">
            <text:p text:style-name="CDataT">3 tables</text:p>
          </table:table-cell>
          <table:table-cell table:style-name="CData">
            <text:p text:style-name="CDataT">2</text:p>
          </table:table-cell>
        </table:table-row>
        <table:table-row>
          <table:table-cell table:style-name="CData2">
            <text:p text:style-name="CData2T">8</text:p>
          </table:table-cell>
          <table:table-cell table:style-name="CData2">
            <text:p text:style-name="CData2T">CASE WHEN</text:p>
          </table:table-cell>
          <table:table-cell table:style-name="CData2">
            <text:p text:style-name="CData2T">2</text:p>
          </table:table-cell>
        </table:table-row>
        <table:table-row>
          <table:table-cell table:style-name="CData">
            <text:p text:style-name="CDataT">9</text:p>
          </table:table-cell>
          <table:table-cell table:style-name="CData">
            <text:p text:style-name="CDataT">INSERT</text:p>
          </table:table-cell>
          <table:table-cell table:style-name="CData">
            <text:p text:style-name="CDataT">1</text:p>
          </table:table-cell>
        </table:table-row>
        <table:table-row>
          <table:table-cell table:style-name="CData2">
            <text:p text:style-name="CData2T">10</text:p>
          </table:table-cell>
          <table:table-cell table:style-name="CData2">
            <text:p text:style-name="CData2T">CREATE TABLE</text:p>
          </table:table-cell>
          <table:table-cell table:style-name="CData2">
            <text:p text:style-name="CData2T">1</text:p>
          </table:table-cell>
        </table:table-row>
      </table:table>
      <text:p text:style-name="Blank"/>
      <text:p text:style-name="Body">La validation porte sur le resultat produit, pas sur la syntaxe. Deux requetes differentes qui donnent le meme output sont toutes les deux acceptees.</text:p>
      <text:h text:outline-level="2" text:style-name="Heading2">5.2  Mecanique de progression</text:h>
      <text:p text:style-name="Bullet">• Navigation par les fleches &lt; et &gt; dans la barre de question</text:p>
      <text:p text:style-name="Bullet">• Points de progression : vert = resolu  jaune = question en cours  rouge = erreurs</text:p>
      <text:p text:style-name="Bullet">• Niveaux 1, 2, 3, 9, 10 : validation binaire uniquement (correct / incorrect)</text:p>
      <text:p text:style-name="Bullet">• Niveaux 4 a 8 : apres 5 erreurs, un indice contextuel est affiche</text:p>
      <text:p text:style-name="Bullet">• Niveaux 4 a 8 : apres 10 erreurs, la solution complete apparait et la question est reformulee</text:p>
      <text:p text:style-name="Bullet">• Apres chaque reponse correcte : la requete de reference est affichee sous le verdict</text:p>
      <text:h text:outline-level="2" text:style-name="Heading2">5.3  Cours par niveau (bouton 💡)</text:h>
      <text:p text:style-name="Body">Chaque niveau dispose d'une bulle de cours academique accessible via le bouton 💡 dans la barre de navigation. Un second clic referme la bulle. Le cours couvre la syntaxe, les pieges habituels et des exemples directement executables dans l'editeur.</text:p>
      <text:h text:outline-level="2" text:style-name="Heading2">5.4  Persistance</text:h>
      <text:p text:style-name="Body">La progression (questions resolues, compteurs d'erreurs, position courante) est sauvegardee dans le localStorage. Elle est restauree automatiquement a la prochaine ouverture sur le meme PC et le meme navigateur.</text:p>
      <text:p text:style-name="HR"/>
      <text:h text:outline-level="1" text:style-name="Heading1">6. Import / Export</text:h>
      <text:h text:outline-level="2" text:style-name="Heading2">6.1  Charger la demo DGSE</text:h>
      <text:p text:style-name="Body">Le bouton demo charge les 3 tables : base (4 lignes), officer (5 lignes), missions (5 lignes). Si une base est deja presente, une confirmation est demandee.</text:p>
      <text:h text:outline-level="2" text:style-name="Heading2">6.2  Importer un CSV</text:h>
      <text:p text:style-name="Bullet">• La premiere ligne est utilisee comme noms de colonnes</text:p>
      <text:p text:style-name="Bullet">• Les valeurs numeriques sont auto-converties en INTEGER ou REAL</text:p>
      <text:p text:style-name="Bullet">• Les cellules vides deviennent NULL</text:p>
      <text:p text:style-name="Bullet">• Le nom du fichier (sans extension) devient le nom de la table</text:p>
      <text:p text:style-name="Bullet">• Si une table du meme nom existe, un suffixe timestamp est ajoute</text:p>
      <text:h text:outline-level="2" text:style-name="Heading2">6.3  Exporter en CSV</text:h>
      <text:p text:style-name="Body">Apres tout SELECT produisant au moins une ligne, le bouton CSV apparait dans la zone resultats. Il genere et telecharge directement export.csv. Les valeurs contenant des virgules ou guillemets sont correctement echappees (RFC 4180).</text:p>
      <text:h text:outline-level="2" text:style-name="Heading2">6.4  Reset</text:h>
      <text:p text:style-name="Body">Efface la base en memoire ET le localStorage apres confirmation.</text:p>
      <text:p text:style-name="HR"/>
      <text:h text:outline-level="1" text:style-name="Heading1">7. Persistance (localStorage)</text:h>
      <text:p text:style-name="Blank"/>
      <table:table table:style-name="TabMain">
        <table:table-column table:style-name="Col2_4cm"/>
        <table:table-column table:style-name="Col2_12cm"/>
        <table:table-row>
          <table:table-cell table:style-name="CLabel">
            <text:p text:style-name="CLabelT">sqlstudio</text:p>
          </table:table-cell>
          <table:table-cell table:style-name="CVal">
            <text:p text:style-name="CValT">Contenu complet de la base : schemas et donnees de toutes les tables.
Mis a jour a chaque CREATE, INSERT, UPDATE, DELETE, DROP, import CSV.</text:p>
          </table:table-cell>
        </table:table-row>
        <table:table-row>
          <table:table-cell table:style-name="CLabel">
            <text:p text:style-name="CLabelT">sqlstudio_ts</text:p>
          </table:table-cell>
          <table:table-cell table:style-name="CVal">
            <text:p text:style-name="CValT">Etat du Training : question courante, questions resolues,
compteurs d'erreurs, questions reformulees.</text:p>
          </table:table-cell>
        </table:table-row>
      </table:table>
      <text:p text:style-name="Blank"/>
      <text:p text:style-name="Body">La persistance est liee au navigateur et au chemin du fichier local. Elle n'est pas partagee entre navigateurs ni entre postes.</text:p>
      <text:p text:style-name="HR"/>
      <text:h text:outline-level="1" text:style-name="Heading1">8. Utilisation</text:h>
      <text:p text:style-name="Code">1. Telecharger sql_studio.html<text:line-break/>2. Ouvrir dans Firefox ou Chrome<text:line-break/>3. C'est tout — aucun serveur, aucune installation, fonctionne hors ligne</text:p>
      <text:p text:style-name="Blank"/>
      <text:p text:style-name="Body">Libre de droits — copiez, modifiez, redistribuez.</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style:style style:name="Title" style:family="paragraph" style:display-name="Title">
      <style:text-properties fo:font-size="20pt" fo:font-weight="bold" fo:color="#000000"/>
      <style:paragraph-properties fo:text-align="center" fo:margin-bottom="4pt"/>
    </style:style>
    <style:style style:name="Subtitle" style:family="paragraph" style:display-name="Subtitle">
      <style:text-properties fo:font-size="10pt" fo:color="#555555"/>
      <style:paragraph-properties fo:text-align="center" fo:margin-bottom="16pt"/>
    </style:style>
    <style:style style:name="Heading1" style:family="paragraph" style:display-name="Heading1">
      <style:text-properties fo:font-size="13pt" fo:font-weight="bold" fo:color="#000000"/>
      <style:paragraph-properties fo:margin-top="14pt" fo:margin-bottom="5pt" fo:border-bottom="0.5pt solid #aaaaaa" fo:padding-bottom="3pt"/>
    </style:style>
    <style:style style:name="Heading2" style:family="paragraph" style:display-name="Heading2">
      <style:text-properties fo:font-size="11pt" fo:font-weight="bold" fo:color="#111111"/>
      <style:paragraph-properties fo:margin-top="10pt" fo:margin-bottom="3pt"/>
    </style:style>
    <style:style style:name="Heading3" style:family="paragraph" style:display-name="Heading3">
      <style:text-properties fo:font-size="10pt" fo:font-weight="bold" fo:color="#333333"/>
      <style:paragraph-properties fo:margin-top="7pt" fo:margin-bottom="2pt"/>
    </style:style>
    <style:style style:name="Body" style:family="paragraph" style:display-name="Body">
      <style:text-properties fo:font-size="10pt" fo:color="#333333"/>
      <style:paragraph-properties fo:margin-bottom="5pt" fo:line-height="140%"/>
    </style:style>
    <style:style style:name="Bullet" style:family="paragraph" style:display-name="Bullet">
      <style:text-properties fo:font-size="10pt" fo:color="#333333"/>
      <style:paragraph-properties fo:margin-left="1cm" fo:margin-bottom="3pt" fo:line-height="135%"/>
    </style:style>
    <style:style style:name="Code" style:family="paragraph" style:display-name="Code">
      <style:text-properties fo:font-size="8.5pt" fo:color="#111111" fo:font-family="Courier New"/>
      <style:paragraph-properties fo:background-color="#f4f4f4" fo:margin-bottom="4pt" fo:padding="4pt" fo:margin-left="0.5cm" fo:margin-right="0.5cm" fo:line-height="128%"/>
    </style:style>
    <style:style style:name="Note" style:family="paragraph" style:display-name="Note">
      <style:text-properties fo:font-size="9pt" fo:color="#666666" fo:font-style="italic"/>
      <style:paragraph-properties fo:margin-bottom="4pt" fo:margin-left="0.8cm" fo:border-left="2pt solid #999999" fo:padding-left="4pt"/>
    </style:style>
    <style:style style:name="HR" style:family="paragraph" style:display-name="HR">
      <style:paragraph-properties fo:border-bottom="0.5pt solid #cccccc" fo:margin-top="4pt" fo:margin-bottom="12pt"/>
    </style:style>
    <style:style style:name="Blank" style:family="paragraph" style:display-name="Blank">
      <style:paragraph-properties fo:margin-bottom="4pt"/>
    </style:style>
    <style:style style:name="CHead" style:family="table-cell" style:display-name="CHead">
      <style:table-cell-properties fo:background-color="#333333" fo:padding="3pt" fo:border-bottom="0.3pt solid #cccccc" fo:border-right="0.3pt solid #dddddd" fo:border-top="0.3pt solid #dddddd" fo:border-left="0.3pt solid #dddddd"/>
    </style:style>
    <style:style style:name="CHeadT" style:family="paragraph" style:display-name="CHeadT">
      <style:text-properties fo:font-size="9pt" fo:color="#ffffff" fo:font-weight="bold"/>
      <style:paragraph-properties fo:margin-bottom="0pt"/>
    </style:style>
    <style:style style:name="CLabel" style:family="table-cell" style:display-name="CLabel">
      <style:table-cell-properties fo:background-color="#eeeeee" fo:padding="3pt" fo:border-bottom="0.3pt solid #cccccc" fo:border-right="0.3pt solid #dddddd" fo:border-top="0.3pt solid #dddddd" fo:border-left="0.3pt solid #dddddd"/>
    </style:style>
    <style:style style:name="CLabelT" style:family="paragraph" style:display-name="CLabelT">
      <style:text-properties fo:font-size="9pt" fo:color="#333333" fo:font-weight="bold"/>
      <style:paragraph-properties fo:margin-bottom="0pt"/>
    </style:style>
    <style:style style:name="CVal" style:family="table-cell" style:display-name="CVal">
      <style:table-cell-properties fo:background-color="#ffffff" fo:padding="3pt" fo:border-bottom="0.3pt solid #cccccc" fo:border-right="0.3pt solid #dddddd" fo:border-top="0.3pt solid #dddddd" fo:border-left="0.3pt solid #dddddd"/>
    </style:style>
    <style:style style:name="CValT" style:family="paragraph" style:display-name="CValT">
      <style:text-properties fo:font-size="9pt" fo:color="#333333" fo:font-weight="normal"/>
      <style:paragraph-properties fo:margin-bottom="0pt"/>
    </style:style>
    <style:style style:name="CData" style:family="table-cell" style:display-name="CData">
      <style:table-cell-properties fo:background-color="#ffffff" fo:padding="3pt" fo:border-bottom="0.3pt solid #cccccc" fo:border-right="0.3pt solid #dddddd" fo:border-top="0.3pt solid #dddddd" fo:border-left="0.3pt solid #dddddd"/>
    </style:style>
    <style:style style:name="CDataT" style:family="paragraph" style:display-name="CDataT">
      <style:text-properties fo:font-size="9pt" fo:color="#333333" fo:font-weight="normal"/>
      <style:paragraph-properties fo:margin-bottom="0pt"/>
    </style:style>
    <style:style style:name="CData2" style:family="table-cell" style:display-name="CData2">
      <style:table-cell-properties fo:background-color="#f7f7f7" fo:padding="3pt" fo:border-bottom="0.3pt solid #cccccc" fo:border-right="0.3pt solid #dddddd" fo:border-top="0.3pt solid #dddddd" fo:border-left="0.3pt solid #dddddd"/>
    </style:style>
    <style:style style:name="CData2T" style:family="paragraph" style:display-name="CData2T">
      <style:text-properties fo:font-size="9pt" fo:color="#333333" fo:font-weight="normal"/>
      <style:paragraph-properties fo:margin-bottom="0pt"/>
    </style:style>
    <style:style style:name="CCode" style:family="table-cell" style:display-name="CCode">
      <style:table-cell-properties fo:background-color="#f4f4f4" fo:padding="3pt" fo:border-bottom="0.3pt solid #cccccc" fo:border-right="0.3pt solid #dddddd" fo:border-top="0.3pt solid #dddddd" fo:border-left="0.3pt solid #dddddd"/>
    </style:style>
    <style:style style:name="CCodeT" style:family="paragraph" style:display-name="CCodeT">
      <style:text-properties fo:font-size="9pt" fo:color="#333333" fo:font-weight="normal"/>
      <style:paragraph-properties fo:margin-bottom="0pt"/>
    </style:style>
    <style:style style:name="TabMain" style:family="table" style:display-name="TabMain">
      <style:table-properties style:width="16cm" table:align="left"/>
    </style:style>
    <style:style style:name="ColWide" style:family="table-column" style:display-name="ColWide">
      <style:table-column-properties style:column-width="16cm"/>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